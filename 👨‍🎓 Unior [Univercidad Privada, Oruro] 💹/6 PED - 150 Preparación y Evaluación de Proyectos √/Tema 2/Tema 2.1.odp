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0B43C71014B1B27232D.png" manifest:media-type="image/png"/>
  <manifest:file-entry manifest:full-path="Pictures/100002010000015A00000092612DD1F126D2CA07.png" manifest:media-type="image/png"/>
  <manifest:file-entry manifest:full-path="Pictures/1000020100000128000000AADF0EB014586032B9.png" manifest:media-type="image/png"/>
  <manifest:file-entry manifest:full-path="Pictures/100002010000012C000000A822A2DF76BD20EDB5.png" manifest:media-type="image/png"/>
  <manifest:file-entry manifest:full-path="Pictures/10000201000000E1000000E1E622FF8379578995.png" manifest:media-type="image/png"/>
  <manifest:file-entry manifest:full-path="Pictures/1000020100000116000000B5A6CA8A8819BCE897.png" manifest:media-type="image/png"/>
  <manifest:file-entry manifest:full-path="Pictures/10000201000000DF000000E29450FA456805B7B3.png" manifest:media-type="image/png"/>
  <manifest:file-entry manifest:full-path="Pictures/10000201000000DC000000E521F0F5DD50E9D897.png" manifest:media-type="image/png"/>
  <manifest:file-entry manifest:full-path="Pictures/10000201000000F6000000CD9209AAB4B7AEB5E9.png" manifest:media-type="image/png"/>
  <manifest:file-entry manifest:full-path="Pictures/1000020100000103000000C32B9DBC580A2A86AF.png" manifest:media-type="image/png"/>
  <manifest:file-entry manifest:full-path="Pictures/100002010000010D000000BB749C8D196AE25A4F.png" manifest:media-type="image/png"/>
  <manifest:file-entry manifest:full-path="Pictures/1000020100000103000000C2BDFDC08C8A76396B.png" manifest:media-type="image/png"/>
  <manifest:file-entry manifest:full-path="Pictures/100000000000046500000181F870FD2030896BBF.jpg" manifest:media-type="image/jpeg"/>
  <manifest:file-entry manifest:full-path="Pictures/1000020100000103000000C2BD62280A506903DB.png" manifest:media-type="image/png"/>
  <manifest:file-entry manifest:full-path="Pictures/10000201000000C5000001006A0DF041DA29C002.png" manifest:media-type="image/png"/>
  <manifest:file-entry manifest:full-path="Pictures/100002010000010B000000BD4969CE13B7DBC08A.png" manifest:media-type="image/png"/>
  <manifest:file-entry manifest:full-path="Pictures/100002010000011A000000B317115F95EA530706.png" manifest:media-type="image/png"/>
  <manifest:file-entry manifest:full-path="Pictures/10000201000000E1000000E1CE8623EEF2609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4.886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4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Alcance del estudio de proyecto</text:p>
            <text:p/>
            <text:p/>
            <text:p/>
            <text:p/>
            <text:p/>
            <text:p/>
            <text:p/>
            <text:p/>
            <text:p/>
            <text:p><text:span text:style-name="T1">La profundidad con que se realice el proyecto dependerá de los que aconseje cada proyecto en particular</text:span></text:p>
          </draw:text-box>
        </draw:frame>
        <draw:frame draw:style-name="gr1" draw:text-style-name="P2" draw:layer="layout" svg:width="12.001cm" svg:height="10cm" svg:x="7.599cm" svg:y="7.2cm">
          <draw:image xlink:href="Pictures/10000201000000F6000000CD9209AAB4B7AEB5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5.349cm" svg:x="1.4cm" svg:y="4.683cm" presentation:class="subtitle" presentation:user-transformed="true">
          <draw:text-box>
            <text:p>Alcance del estudio de proyecto</text:p>
            <text:p>Estudios a realizar</text:p>
            <text:p/>
            <text:p/>
            <text:p/>
            <text:p/>
            <text:p/>
            <text:p/>
            <text:p/>
            <text:p/>
            <text:p/>
            <text:p><text:span text:style-name="T1">Viabilidad comercial</text:span></text:p>
            <text:p><text:span text:style-name="T1">Mide si el mercado es apto para el producto que se quiere introducir</text:span></text:p>
          </draw:text-box>
        </draw:frame>
        <draw:frame draw:style-name="gr1" draw:text-style-name="P2" draw:layer="layout" svg:width="14.081cm" svg:height="10.6cm" svg:x="7.348cm" svg:y="7.4cm">
          <draw:image xlink:href="Pictures/1000020100000103000000C32B9DBC580A2A8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5.349cm" svg:x="1.4cm" svg:y="4.683cm" presentation:class="subtitle" presentation:user-transformed="true">
          <draw:text-box>
            <text:p>Alcance del estudio de proyecto</text:p>
            <text:p>Estudios a realizar</text:p>
            <text:p/>
            <text:p/>
            <text:p/>
            <text:p/>
            <text:p/>
            <text:p/>
            <text:p/>
            <text:p/>
            <text:p/>
            <text:p><text:span text:style-name="T1">Viabilidad técnica</text:span></text:p>
            <text:p><text:span text:style-name="T1">Verifica que existen los recursos técnicos para implementar el proyecto </text:span></text:p>
          </draw:text-box>
        </draw:frame>
        <draw:frame draw:style-name="gr1" draw:text-style-name="P2" draw:layer="layout" svg:width="10.2cm" svg:height="10.617cm" svg:x="8.4cm" svg:y="7.4cm">
          <draw:image xlink:href="Pictures/10000201000000DC000000E521F0F5DD50E9D8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5.349cm" svg:x="1.4cm" svg:y="4.683cm" presentation:class="subtitle" presentation:user-transformed="true">
          <draw:text-box>
            <text:p>Alcance del estudio de proyecto</text:p>
            <text:p>Estudios a realizar</text:p>
            <text:p/>
            <text:p/>
            <text:p/>
            <text:p/>
            <text:p/>
            <text:p/>
            <text:p/>
            <text:p/>
            <text:p/>
            <text:p><text:span text:style-name="T1">Viabilidad legal</text:span></text:p>
            <text:p><text:span text:style-name="T1">Verifica que se cumplan todas las normas establecidas por la ley </text:span></text:p>
          </draw:text-box>
        </draw:frame>
        <draw:frame draw:style-name="gr1" draw:text-style-name="P2" draw:layer="layout" svg:width="10.352cm" svg:height="10.352cm" svg:x="8.048cm" svg:y="7.648cm">
          <draw:image xlink:href="Pictures/10000201000000E1000000E1E622FF8379578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5.349cm" svg:x="1.4cm" svg:y="4.683cm" presentation:class="subtitle" presentation:user-transformed="true">
          <draw:text-box>
            <text:p>Alcance del estudio de proyecto</text:p>
            <text:p>Estudios a realizar</text:p>
            <text:p/>
            <text:p/>
            <text:p/>
            <text:p/>
            <text:p/>
            <text:p/>
            <text:p/>
            <text:p/>
            <text:p/>
            <text:p><text:span text:style-name="T1">Viabilidad organizacional</text:span></text:p>
            <text:p><text:span text:style-name="T1">Verifica que existe el personal necesario para la puesta en marcha del proyecto </text:span></text:p>
          </draw:text-box>
        </draw:frame>
        <draw:frame draw:style-name="gr1" draw:text-style-name="P2" draw:layer="layout" svg:width="14.672cm" svg:height="10.2cm" svg:x="7.084cm" svg:y="7.6cm">
          <draw:image xlink:href="Pictures/100002010000010D000000BB749C8D196AE25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5.349cm" svg:x="1.4cm" svg:y="4.683cm" presentation:class="subtitle" presentation:user-transformed="true">
          <draw:text-box>
            <text:p>Alcance del estudio de proyecto</text:p>
            <text:p>Estudios a realizar</text:p>
            <text:p/>
            <text:p/>
            <text:p/>
            <text:p/>
            <text:p/>
            <text:p/>
            <text:p/>
            <text:p/>
            <text:p/>
            <text:p><text:span text:style-name="T1">Viabilidad financiera</text:span></text:p>
            <text:p><text:span text:style-name="T1">Mide la rentabilidad del proyecto </text:span></text:p>
          </draw:text-box>
        </draw:frame>
        <draw:frame draw:style-name="gr1" draw:text-style-name="P2" draw:layer="layout" svg:width="15.341cm" svg:height="9.988cm" svg:x="6.646cm" svg:y="7.612cm">
          <draw:image xlink:href="Pictures/1000020100000116000000B5A6CA8A8819BCE8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l estudio del proyecto como proceso</text:p>
            <text:p/>
            <text:p/>
            <text:p/>
            <text:p/>
            <text:p/>
            <text:p/>
            <text:p/>
            <text:p/>
            <text:p/>
            <text:p><text:span text:style-name="T1"/></text:p>
          </draw:text-box>
        </draw:frame>
        <draw:frame draw:style-name="gr1" draw:text-style-name="P2" draw:layer="layout" svg:width="25.354cm" svg:height="12.4cm" svg:x="0.646cm" svg:y="7.2cm">
          <draw:image xlink:href="Pictures/100000000000046500000181F870FD2030896B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técnico del proyecto</text:p>
            <text:p/>
            <text:p/>
            <text:p/>
            <text:p/>
            <text:p/>
            <text:p/>
            <text:p/>
            <text:p/>
            <text:p/>
            <text:p><text:span text:style-name="T1">Objeto proveer información para cuantificar el monto de inversión </text:span></text:p>
          </draw:text-box>
        </draw:frame>
        <draw:frame draw:style-name="gr1" draw:text-style-name="P2" draw:layer="layout" svg:width="14.655cm" svg:height="9.302cm" svg:x="7.345cm" svg:y="7.8cm">
          <draw:image xlink:href="Pictures/100002010000011A000000B317115F95EA5307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técnico del proyecto</text:p>
            <text:p/>
            <text:p/>
            <text:p/>
            <text:p/>
            <text:p/>
            <text:p/>
            <text:p/>
            <text:p/>
            <text:p/>
            <text:p><text:span text:style-name="T1">Definir que proceso productivo de todas las opciones es el que conviene </text:span></text:p>
          </draw:text-box>
        </draw:frame>
        <draw:frame draw:style-name="gr1" draw:text-style-name="P2" draw:layer="layout" svg:width="10cm" svg:height="10cm" svg:x="2.6cm" svg:y="7.4cm">
          <draw:image xlink:href="Pictures/10000201000000E1000000E1CE8623EEF2609FAD.png" xlink:type="simple" xlink:show="embed" xlink:actuate="onLoad">
            <text:p/>
          </draw:image>
        </draw:frame>
        <draw:frame draw:style-name="gr1" draw:text-style-name="P2" draw:layer="layout" svg:width="7.2cm" svg:height="9.357cm" svg:x="16cm" svg:y="7.8cm">
          <draw:image xlink:href="Pictures/10000201000000C5000001006A0DF041DA29C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técnico del proyecto</text:p>
            <text:p/>
            <text:p/>
            <text:p/>
            <text:p/>
            <text:p/>
            <text:p/>
            <text:p/>
            <text:p/>
            <text:p/>
            <text:p><text:span text:style-name="T1">Ayuda a cuantificar la mano de obra </text:span></text:p>
          </draw:text-box>
        </draw:frame>
        <draw:frame draw:style-name="gr1" draw:text-style-name="P2" draw:layer="layout" svg:width="17.146cm" svg:height="9.6cm" svg:x="6.263cm" svg:y="7.6cm">
          <draw:image xlink:href="Pictures/100002010000012C000000A822A2DF76BD20E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técnico del proyecto</text:p>
            <text:p/>
            <text:p/>
            <text:p/>
            <text:p/>
            <text:p/>
            <text:p/>
            <text:p/>
            <text:p/>
            <text:p/>
            <text:p><text:span text:style-name="T1">Ayuda a conocer las materias primas </text:span></text:p>
          </draw:text-box>
        </draw:frame>
        <draw:frame draw:style-name="gr1" draw:text-style-name="P2" draw:layer="layout" svg:width="17.066cm" svg:height="9.8cm" svg:x="5.6cm" svg:y="7.6cm">
          <draw:image xlink:href="Pictures/1000020100000128000000AADF0EB014586032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/>
            <text:p/>
            <text:p/>
            <text:p/>
            <text:p/>
            <text:p/>
            <text:p/>
            <text:p/>
            <text:p/>
            <text:p><text:span text:style-name="T1">Mercado: el espacio donde se ofertaran los productos del proyecto</text:span></text:p>
          </draw:text-box>
        </draw:frame>
        <draw:frame draw:style-name="gr1" draw:text-style-name="P2" draw:layer="layout" svg:width="14.409cm" svg:height="10.2cm" svg:x="7.2cm" svg:y="7.4cm">
          <draw:image xlink:href="Pictures/100002010000010B000000BD4969CE13B7DBC0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/>
            <text:p/>
            <text:p/>
            <text:p/>
            <text:p/>
            <text:p/>
            <text:p/>
            <text:p/>
            <text:p/>
            <text:p><text:span text:style-name="T1">Costos pueden proveerse simulando la situación futura</text:span></text:p>
          </draw:text-box>
        </draw:frame>
        <draw:frame draw:style-name="gr1" draw:text-style-name="P2" draw:layer="layout" svg:width="13.852cm" svg:height="10.375cm" svg:x="7.348cm" svg:y="7.2cm">
          <draw:image xlink:href="Pictures/1000020100000103000000C2BD62280A506903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/>
            <text:p/>
            <text:p/>
            <text:p/>
            <text:p/>
            <text:p/>
            <text:p/>
            <text:p/>
            <text:p/>
            <text:p><text:span text:style-name="T1">Ayuda a definir políticas de distribución</text:span></text:p>
          </draw:text-box>
        </draw:frame>
        <draw:frame draw:style-name="gr1" draw:text-style-name="P2" draw:layer="layout" svg:width="21.479cm" svg:height="9.062cm" svg:x="3.4cm" svg:y="7.738cm">
          <draw:image xlink:href="Pictures/100002010000015A00000092612DD1F126D2CA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>Aspectos a estudiar</text:p>
            <text:p/>
            <text:p/>
            <text:p/>
            <text:p/>
            <text:p/>
            <text:p/>
            <text:p/>
            <text:p/>
            <text:p/>
            <text:p><text:span text:style-name="T1">El consumidor y las demandas</text:span></text:p>
          </draw:text-box>
        </draw:frame>
        <draw:frame draw:style-name="gr1" draw:text-style-name="P2" draw:layer="layout" svg:width="13.619cm" svg:height="10.2cm" svg:x="7.6cm" svg:y="8cm">
          <draw:image xlink:href="Pictures/1000020100000103000000C2BDFDC08C8A7639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>Aspectos a estudiar</text:p>
            <text:p/>
            <text:p/>
            <text:p/>
            <text:p/>
            <text:p/>
            <text:p/>
            <text:p/>
            <text:p/>
            <text:p/>
            <text:p><text:span text:style-name="T1">La competencia y las ofertas del mercado</text:span></text:p>
          </draw:text-box>
        </draw:frame>
        <draw:frame draw:style-name="gr1" draw:text-style-name="P2" draw:layer="layout" svg:width="10.4cm" svg:height="10.541cm" svg:x="8.2cm" svg:y="7.821cm">
          <draw:image xlink:href="Pictures/10000201000000DF000000E29450FA456805B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>Estudio de mercado</text:p>
            <text:p>Aspectos a estudiar</text:p>
            <text:p/>
            <text:p/>
            <text:p/>
            <text:p/>
            <text:p/>
            <text:p/>
            <text:p/>
            <text:p/>
            <text:p/>
            <text:p><text:span text:style-name="T1">Comercialización del producto</text:span></text:p>
          </draw:text-box>
        </draw:frame>
        <draw:frame draw:style-name="gr1" draw:text-style-name="P2" draw:layer="layout" svg:width="16.117cm" svg:height="10.362cm" svg:x="6.8cm" svg:y="7.838cm">
          <draw:image xlink:href="Pictures/1000020100000118000000B43C71014B1B2723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l proceso de preparación de un proyecto</text:p>
          </draw:text-box>
        </draw:frame>
        <draw:frame presentation:style-name="pr2" draw:text-style-name="P1" draw:layer="layout" svg:width="25.199cm" svg:height="14.886cm" svg:x="1.4cm" svg:y="4.914cm" presentation:class="subtitle" presentation:user-transformed="true">
          <draw:text-box>
            <text:p/>
            <text:p/>
            <text:p/>
            <text:p/>
            <text:p><text:span text:style-name="T2">Gracias</text:span></text:p>
            <text:p/>
            <text:p/>
            <text:p/>
            <text:p/>
            <text:p/>
            <text:p><text:span text:style-name="T1">Ing. Alvaro Rodrigo Lara Valdiv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17:26:30.666416246</meta:creation-date>
    <dc:date>2020-09-25T18:51:57.310384713</dc:date>
    <meta:editing-duration>PT13M3S</meta:editing-duration>
    <meta:editing-cycles>2</meta:editing-cycles>
    <meta:generator>LibreOffice/5.2.7.2$Linux_X86_64 LibreOffice_project/20m0$Build-2</meta:generator>
    <meta:document-statistic meta:object-count="111"/>
  </office:meta>
</office:document-meta>
</file>