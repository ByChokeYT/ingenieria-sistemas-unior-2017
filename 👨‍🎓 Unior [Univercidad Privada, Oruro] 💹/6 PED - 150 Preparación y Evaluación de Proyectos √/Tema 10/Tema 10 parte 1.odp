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3000000C22D81CFFCA101C010.png" manifest:media-type="image/png"/>
  <manifest:file-entry manifest:full-path="Pictures/100002010000012F000000A67F4135DCB2FEEAB9.png" manifest:media-type="image/png"/>
  <manifest:file-entry manifest:full-path="Pictures/1000020100000109000000BE8880F9EE659C92A7.png" manifest:media-type="image/png"/>
  <manifest:file-entry manifest:full-path="Pictures/10000201000000F5000000CEADFDB9948DF1F2BD.png" manifest:media-type="image/png"/>
  <manifest:file-entry manifest:full-path="Pictures/1000020100000129000000AA6A0197A79ABCE7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5.2cm"/>
    </style:style>
    <style:style style:name="pr3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18pt" style:font-size-asian="32pt" style:font-size-complex="32pt"/>
    </style:style>
    <style:style style:name="T2" style:family="text">
      <style:text-properties fo:font-size="44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Inversiones del proyecto</text:p>
          </draw:text-box>
        </draw:frame>
        <draw:frame presentation:style-name="pr2" draw:text-style-name="P1" draw:layer="layout" svg:width="25.199cm" svg:height="15.349cm" svg:x="1.4cm" svg:y="3.926cm" presentation:class="subtitle" presentation:user-transformed="true">
          <draw:text-box>
            <text:p>Inversiones previas a la puesta en marcha</text:p>
            <text:p/>
            <text:p/>
            <text:p/>
            <text:p/>
            <text:p/>
            <text:p/>
            <text:p/>
            <text:p/>
            <text:p/>
            <text:p/>
            <text:p><text:span text:style-name="T1">Grupo 1: Activos fijos (Bienes tangibles que se utilizan en el proceso de transformación de los insumos)</text:span></text:p>
          </draw:text-box>
        </draw:frame>
        <draw:frame draw:style-name="gr1" draw:text-style-name="P2" draw:layer="layout" svg:width="19.7cm" svg:height="10.791cm" svg:x="4.6cm" svg:y="5.609cm">
          <draw:image xlink:href="Pictures/100002010000012F000000A67F4135DCB2FEEA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Inversiones del proyecto</text:p>
          </draw:text-box>
        </draw:frame>
        <draw:frame presentation:style-name="pr2" draw:text-style-name="P1" draw:layer="layout" svg:width="25.199cm" svg:height="15.2cm" svg:x="1.4cm" svg:y="4cm" presentation:class="subtitle" presentation:user-transformed="true">
          <draw:text-box>
            <text:p>Inversiones previas a la puesta en marcha</text:p>
            <text:p/>
            <text:p/>
            <text:p/>
            <text:p/>
            <text:p/>
            <text:p/>
            <text:p/>
            <text:p/>
            <text:p/>
            <text:p/>
            <text:p><text:span text:style-name="T1">Grupo 2: Activos nominales (Servicios o derechos adquiridos, patentes, licencias)</text:span></text:p>
          </draw:text-box>
        </draw:frame>
        <draw:frame draw:style-name="gr1" draw:text-style-name="P2" draw:layer="layout" svg:width="15.063cm" svg:height="10.8cm" svg:x="6.737cm" svg:y="6.4cm">
          <draw:image xlink:href="Pictures/1000020100000109000000BE8880F9EE659C92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Inversiones del proyecto</text:p>
          </draw:text-box>
        </draw:frame>
        <draw:frame presentation:style-name="pr2" draw:text-style-name="P1" draw:layer="layout" svg:width="25.199cm" svg:height="15.349cm" svg:x="1.4cm" svg:y="3.926cm" presentation:class="subtitle" presentation:user-transformed="true">
          <draw:text-box>
            <text:p>Inversiones previas a la puesta en marcha</text:p>
            <text:p/>
            <text:p/>
            <text:p/>
            <text:p/>
            <text:p/>
            <text:p/>
            <text:p/>
            <text:p/>
            <text:p/>
            <text:p/>
            <text:p><text:span text:style-name="T1">Grupo 3: Capital de trabajo (Gastos de puesta en marcha, publicidad seguros, pruebas, etc) </text:span></text:p>
          </draw:text-box>
        </draw:frame>
        <draw:frame draw:style-name="gr1" draw:text-style-name="P2" draw:layer="layout" svg:width="13.321cm" svg:height="11.2cm" svg:x="7.319cm" svg:y="5.6cm">
          <draw:image xlink:href="Pictures/10000201000000F5000000CEADFDB9948DF1F2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Inversiones del proyecto</text:p>
          </draw:text-box>
        </draw:frame>
        <draw:frame presentation:style-name="pr2" draw:text-style-name="P1" draw:layer="layout" svg:width="25.199cm" svg:height="15.349cm" svg:x="1.4cm" svg:y="3.926cm" presentation:class="subtitle" presentation:user-transformed="true">
          <draw:text-box>
            <text:p>Inversión en capital de trabajo</text:p>
            <text:p/>
            <text:p/>
            <text:p/>
            <text:p/>
            <text:p/>
            <text:p/>
            <text:p/>
            <text:p/>
            <text:p/>
            <text:p/>
            <text:p><text:span text:style-name="T1">Conjunto de recursos necesarios, en forma de activos corrientes, para las operaciones normales del proyecto</text:span></text:p>
          </draw:text-box>
        </draw:frame>
        <draw:frame draw:style-name="gr1" draw:text-style-name="P2" draw:layer="layout" svg:width="19.738cm" svg:height="11.297cm" svg:x="4.4cm" svg:y="5.503cm">
          <draw:image xlink:href="Pictures/1000020100000129000000AA6A0197A79ABCE7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Inversiones del proyecto</text:p>
          </draw:text-box>
        </draw:frame>
        <draw:frame presentation:style-name="pr2" draw:text-style-name="P1" draw:layer="layout" svg:width="25.199cm" svg:height="15.2cm" svg:x="1.4cm" svg:y="4cm" presentation:class="subtitle" presentation:user-transformed="true">
          <draw:text-box>
            <text:p>Inversión en capital de trabajo</text:p>
            <text:p/>
            <text:p/>
            <text:p/>
            <text:p/>
            <text:p/>
            <text:p/>
            <text:p/>
            <text:p/>
            <text:p/>
            <text:p><text:span text:style-name="T1">Se determina para un ciclo de trabajo </text:span></text:p>
          </draw:text-box>
        </draw:frame>
        <draw:frame draw:style-name="gr1" draw:text-style-name="P2" draw:layer="layout" svg:width="13.6cm" svg:height="10.186cm" svg:x="7cm" svg:y="6.6cm">
          <draw:image xlink:href="Pictures/1000020100000103000000C22D81CFFCA101C0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Inversiones del proyecto</text:p>
          </draw:text-box>
        </draw:frame>
        <draw:frame presentation:style-name="pr2" draw:text-style-name="P1" draw:layer="layout" svg:width="25.199cm" svg:height="15.2cm" svg:x="1.4cm" svg:y="4cm" presentation:class="subtitle" presentation:user-transformed="true">
          <draw:text-box>
            <text:p/>
            <text:p/>
            <text:p/>
            <text:p/>
            <text:p/>
            <text:p><text:span text:style-name="T2">Gracias</text:span></text:p>
            <text:p/>
            <text:p/>
            <text:p/>
            <text:p/>
            <text:p><text:span text:style-name="T1">Ing. Alvaro Rodrigo Lara Valdivia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B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0T18:08:21.164885003</meta:creation-date>
    <dc:date>2020-10-20T18:26:26.305493741</dc:date>
    <meta:editing-duration>PT6M36S</meta:editing-duration>
    <meta:editing-cycles>1</meta:editing-cycles>
    <meta:document-statistic meta:object-count="50"/>
    <meta:generator>LibreOffice/5.2.7.2$Linux_X86_64 LibreOffice_project/20m0$Build-2</meta:generator>
  </office:meta>
</office:document-meta>
</file>